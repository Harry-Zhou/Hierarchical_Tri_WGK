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429in"/>
    </style:style>
    <style:style style:name="co2" style:family="table-column">
      <style:table-column-properties fo:break-before="auto" style:column-width="2.448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6898in"/>
    </style:style>
    <style:style style:name="co5" style:family="table-column">
      <style:table-column-properties fo:break-before="auto" style:column-width="0.6571in"/>
    </style:style>
    <style:style style:name="co6" style:family="table-column">
      <style:table-column-properties fo:break-before="auto" style:column-width="1.0327in"/>
    </style:style>
    <style:style style:name="co7" style:family="table-column">
      <style:table-column-properties fo:break-before="auto" style:column-width="0.989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baseline_grakels_resul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graph_kernel</text:p>
          </table:table-cell>
          <table:table-cell table:style-name="Default" office:value-type="string" calcext:value-type="string">
            <text:p>normalize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f1_score</text:p>
          </table:table-cell>
          <table:table-cell office:value-type="string" calcext:value-type="string">
            <text:p>roc_auc_score</text:p>
          </table:table-cell>
          <table:table-cell office:value-type="string" calcext:value-type="string">
            <text:p>run_ti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TAG</text:p>
          </table:table-cell>
          <table:table-cell office:value-type="string" calcext:value-type="string">
            <text:p>OddSth</text:p>
          </table:table-cell>
          <table:table-cell office:value-type="string" calcext:value-type="string">
            <text:p>True</text:p>
          </table:table-cell>
          <table:table-cell office:value-type="float" office:value="0.815789" calcext:value-type="float">
            <text:p>0.815789</text:p>
          </table:table-cell>
          <table:table-cell office:value-type="float" office:value="0.788792" calcext:value-type="float">
            <text:p>0.788792</text:p>
          </table:table-cell>
          <table:table-cell office:value-type="float" office:value="0.916667" calcext:value-type="float">
            <text:p>0.916667</text:p>
          </table:table-cell>
          <table:table-cell office:value-type="float" office:value="0.399448" calcext:value-type="float">
            <text:p>0.399448</text:p>
          </table:table-cell>
          <table:table-cell table:formula="of:=MAX([.D2:.D10])" office:value-type="float" office:value="0.894737" calcext:value-type="float">
            <text:p>0.894737</text:p>
          </table:table-cell>
          <table:table-cell table:formula="of:=MAX([.E2:.E10])" office:value-type="float" office:value="0.894737" calcext:value-type="float">
            <text:p>0.894737</text:p>
          </table:table-cell>
          <table:table-cell table:formula="of:=MAX([.F2:.F10])" office:value-type="float" office:value="0.971154" calcext:value-type="float">
            <text:p>0.971154</text:p>
          </table:table-cell>
        </table:table-row>
        <table:table-row table:style-name="ro1">
          <table:table-cell office:value-type="string" calcext:value-type="string">
            <text:p>MUTAG</text:p>
          </table:table-cell>
          <table:table-cell office:value-type="string" calcext:value-type="string">
            <text:p>GraphletSampling</text:p>
          </table:table-cell>
          <table:table-cell office:value-type="string" calcext:value-type="string">
            <text:p>True</text:p>
          </table:table-cell>
          <table:table-cell office:value-type="float" office:value="0.736842" calcext:value-type="float">
            <text:p>0.736842</text:p>
          </table:table-cell>
          <table:table-cell office:value-type="float" office:value="0.688596" calcext:value-type="float">
            <text:p>0.688596</text:p>
          </table:table-cell>
          <table:table-cell office:value-type="float" office:value="0.857372" calcext:value-type="float">
            <text:p>0.857372</text:p>
          </table:table-cell>
          <table:table-cell office:value-type="float" office:value="1.487636" calcext:value-type="float">
            <text:p>1.4876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TAG</text:p>
          </table:table-cell>
          <table:table-cell office:value-type="string" calcext:value-type="string">
            <text:p>HadamardCode</text:p>
          </table:table-cell>
          <table:table-cell office:value-type="string" calcext:value-type="string">
            <text:p>True</text:p>
          </table:table-cell>
          <table:table-cell office:value-type="float" office:value="0.894737" calcext:value-type="float">
            <text:p>0.894737</text:p>
          </table:table-cell>
          <table:table-cell office:value-type="float" office:value="0.891901" calcext:value-type="float">
            <text:p>0.891901</text:p>
          </table:table-cell>
          <table:table-cell office:value-type="float" office:value="0.903846" calcext:value-type="float">
            <text:p>0.903846</text:p>
          </table:table-cell>
          <table:table-cell office:value-type="float" office:value="0.066498" calcext:value-type="float">
            <text:p>0.0664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TAG</text:p>
          </table:table-cell>
          <table:table-cell office:value-type="string" calcext:value-type="string">
            <text:p>WeisfeilerLehman</text:p>
          </table:table-cell>
          <table:table-cell office:value-type="string" calcext:value-type="string">
            <text:p>True</text:p>
          </table:table-cell>
          <table:table-cell office:value-type="float" office:value="0.815789" calcext:value-type="float">
            <text:p>0.815789</text:p>
          </table:table-cell>
          <table:table-cell office:value-type="float" office:value="0.817668" calcext:value-type="float">
            <text:p>0.817668</text:p>
          </table:table-cell>
          <table:table-cell office:value-type="float" office:value="0.919872" calcext:value-type="float">
            <text:p>0.919872</text:p>
          </table:table-cell>
          <table:table-cell office:value-type="float" office:value="0.049558" calcext:value-type="float">
            <text:p>0.0495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TAG</text:p>
          </table:table-cell>
          <table:table-cell office:value-type="string" calcext:value-type="string">
            <text:p>WeisfeilerLehmanOptimalAssignment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.894737" calcext:value-type="float">
            <text:p>0.894737</text:p>
          </table:table-cell>
          <table:table-cell office:value-type="float" office:value="0.958333" calcext:value-type="float">
            <text:p>0.958333</text:p>
          </table:table-cell>
          <table:table-cell office:value-type="float" office:value="0.379444" calcext:value-type="float">
            <text:p>0.3794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TAG</text:p>
          </table:table-cell>
          <table:table-cell office:value-type="string" calcext:value-type="string">
            <text:p>Propagation</text:p>
          </table:table-cell>
          <table:table-cell office:value-type="string" calcext:value-type="string">
            <text:p>True</text:p>
          </table:table-cell>
          <table:table-cell office:value-type="float" office:value="0.763158" calcext:value-type="float">
            <text:p>0.763158</text:p>
          </table:table-cell>
          <table:table-cell office:value-type="float" office:value="0.760244" calcext:value-type="float">
            <text:p>0.760244</text:p>
          </table:table-cell>
          <table:table-cell office:value-type="float" office:value="0.759615" calcext:value-type="float">
            <text:p>0.759615</text:p>
          </table:table-cell>
          <table:table-cell office:value-type="float" office:value="0.16241" calcext:value-type="float">
            <text:p>0.162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TAG</text:p>
          </table:table-cell>
          <table:table-cell office:value-type="string" calcext:value-type="string">
            <text:p>CoreFramework</text:p>
          </table:table-cell>
          <table:table-cell office:value-type="string" calcext:value-type="string">
            <text:p>True</text:p>
          </table:table-cell>
          <table:table-cell office:value-type="float" office:value="0.868421" calcext:value-type="float">
            <text:p>0.868421</text:p>
          </table:table-cell>
          <table:table-cell office:value-type="float" office:value="0.862611" calcext:value-type="float">
            <text:p>0.862611</text:p>
          </table:table-cell>
          <table:table-cell office:value-type="float" office:value="0.935897" calcext:value-type="float">
            <text:p>0.935897</text:p>
          </table:table-cell>
          <table:table-cell office:value-type="float" office:value="0.78413" calcext:value-type="float">
            <text:p>0.784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TAG</text:p>
          </table:table-cell>
          <table:table-cell office:value-type="string" calcext:value-type="string">
            <text:p>NeighborhoodHash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.894737" calcext:value-type="float">
            <text:p>0.894737</text:p>
          </table:table-cell>
          <table:table-cell office:value-type="float" office:value="0.971154" calcext:value-type="float">
            <text:p>0.971154</text:p>
          </table:table-cell>
          <table:table-cell office:value-type="float" office:value="0.31368" calcext:value-type="float">
            <text:p>0.313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TAG</text:p>
          </table:table-cell>
          <table:table-cell office:value-type="string" calcext:value-type="string">
            <text:p>PyramidMatch</text:p>
          </table:table-cell>
          <table:table-cell office:value-type="string" calcext:value-type="string">
            <text:p>True</text:p>
          </table:table-cell>
          <table:table-cell office:value-type="float" office:value="0.868421" calcext:value-type="float">
            <text:p>0.868421</text:p>
          </table:table-cell>
          <table:table-cell office:value-type="float" office:value="0.862611" calcext:value-type="float">
            <text:p>0.862611</text:p>
          </table:table-cell>
          <table:table-cell office:value-type="float" office:value="0.871795" calcext:value-type="float">
            <text:p>0.871795</text:p>
          </table:table-cell>
          <table:table-cell office:value-type="float" office:value="0.735629" calcext:value-type="float">
            <text:p>0.7356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ZR_MD</text:p>
          </table:table-cell>
          <table:table-cell office:value-type="string" calcext:value-type="string">
            <text:p>OddSth</text:p>
          </table:table-cell>
          <table:table-cell office:value-type="string" calcext:value-type="string">
            <text:p>True</text:p>
          </table:table-cell>
          <table:table-cell office:value-type="float" office:value="0.580645" calcext:value-type="float">
            <text:p>0.580645</text:p>
          </table:table-cell>
          <table:table-cell office:value-type="float" office:value="0.572716" calcext:value-type="float">
            <text:p>0.572716</text:p>
          </table:table-cell>
          <table:table-cell office:value-type="float" office:value="0.670693" calcext:value-type="float">
            <text:p>0.670693</text:p>
          </table:table-cell>
          <table:table-cell office:value-type="float" office:value="1.010947" calcext:value-type="float">
            <text:p>1.010947</text:p>
          </table:table-cell>
          <table:table-cell table:formula="of:=MAX([.D11:.D19])" office:value-type="float" office:value="0.709677" calcext:value-type="float">
            <text:p>0.709677</text:p>
          </table:table-cell>
          <table:table-cell table:formula="of:=MAX([.E11:.E19])" office:value-type="float" office:value="0.706576" calcext:value-type="float">
            <text:p>0.706576</text:p>
          </table:table-cell>
          <table:table-cell table:formula="of:=MAX([.F11:.F19])" office:value-type="float" office:value="0.783088" calcext:value-type="float">
            <text:p>0.783088</text:p>
          </table:table-cell>
        </table:table-row>
        <table:table-row table:style-name="ro1">
          <table:table-cell office:value-type="string" calcext:value-type="string">
            <text:p>BZR_MD</text:p>
          </table:table-cell>
          <table:table-cell office:value-type="string" calcext:value-type="string">
            <text:p>GraphletSampling</text:p>
          </table:table-cell>
          <table:table-cell office:value-type="string" calcext:value-type="string">
            <text:p>True</text:p>
          </table:table-cell>
          <table:table-cell office:value-type="float" office:value="0.548387" calcext:value-type="float">
            <text:p>0.548387</text:p>
          </table:table-cell>
          <table:table-cell office:value-type="float" office:value="0.388441" calcext:value-type="float">
            <text:p>0.388441</text:p>
          </table:table-cell>
          <table:table-cell office:value-type="float" office:value="0.5" calcext:value-type="float">
            <text:p>0.5</text:p>
          </table:table-cell>
          <table:table-cell office:value-type="float" office:value="3201.259386" calcext:value-type="float">
            <text:p>3201.2593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ZR_MD</text:p>
          </table:table-cell>
          <table:table-cell office:value-type="string" calcext:value-type="string">
            <text:p>HadamardCode</text:p>
          </table:table-cell>
          <table:table-cell office:value-type="string" calcext:value-type="string">
            <text:p>True</text:p>
          </table:table-cell>
          <table:table-cell office:value-type="float" office:value="0.66129" calcext:value-type="float">
            <text:p>0.66129</text:p>
          </table:table-cell>
          <table:table-cell office:value-type="float" office:value="0.648655" calcext:value-type="float">
            <text:p>0.648655</text:p>
          </table:table-cell>
          <table:table-cell office:value-type="float" office:value="0.658088" calcext:value-type="float">
            <text:p>0.658088</text:p>
          </table:table-cell>
          <table:table-cell office:value-type="float" office:value="1.210534" calcext:value-type="float">
            <text:p>1.2105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ZR_MD</text:p>
          </table:table-cell>
          <table:table-cell office:value-type="string" calcext:value-type="string">
            <text:p>WeisfeilerLehman</text:p>
          </table:table-cell>
          <table:table-cell office:value-type="string" calcext:value-type="string">
            <text:p>True</text:p>
          </table:table-cell>
          <table:table-cell office:value-type="float" office:value="0.596774" calcext:value-type="float">
            <text:p>0.596774</text:p>
          </table:table-cell>
          <table:table-cell office:value-type="float" office:value="0.549214" calcext:value-type="float">
            <text:p>0.549214</text:p>
          </table:table-cell>
          <table:table-cell office:value-type="float" office:value="0.56145" calcext:value-type="float">
            <text:p>0.56145</text:p>
          </table:table-cell>
          <table:table-cell office:value-type="float" office:value="0.754609" calcext:value-type="float">
            <text:p>0.7546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ZR_MD</text:p>
          </table:table-cell>
          <table:table-cell office:value-type="string" calcext:value-type="string">
            <text:p>WeisfeilerLehmanOptimalAssignment</text:p>
          </table:table-cell>
          <table:table-cell office:value-type="string" calcext:value-type="string">
            <text:p>True</text:p>
          </table:table-cell>
          <table:table-cell office:value-type="float" office:value="0.645161" calcext:value-type="float">
            <text:p>0.645161</text:p>
          </table:table-cell>
          <table:table-cell office:value-type="float" office:value="0.623387" calcext:value-type="float">
            <text:p>0.623387</text:p>
          </table:table-cell>
          <table:table-cell office:value-type="float" office:value="0.600315" calcext:value-type="float">
            <text:p>0.600315</text:p>
          </table:table-cell>
          <table:table-cell office:value-type="float" office:value="2.665459" calcext:value-type="float">
            <text:p>2.6654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ZR_MD</text:p>
          </table:table-cell>
          <table:table-cell office:value-type="string" calcext:value-type="string">
            <text:p>Propagation</text:p>
          </table:table-cell>
          <table:table-cell office:value-type="string" calcext:value-type="string">
            <text:p>True</text:p>
          </table:table-cell>
          <table:table-cell office:value-type="float" office:value="0.596774" calcext:value-type="float">
            <text:p>0.596774</text:p>
          </table:table-cell>
          <table:table-cell office:value-type="float" office:value="0.59603" calcext:value-type="float">
            <text:p>0.59603</text:p>
          </table:table-cell>
          <table:table-cell office:value-type="float" office:value="0.54937" calcext:value-type="float">
            <text:p>0.54937</text:p>
          </table:table-cell>
          <table:table-cell office:value-type="float" office:value="0.906201" calcext:value-type="float">
            <text:p>0.9062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ZR_MD</text:p>
          </table:table-cell>
          <table:table-cell office:value-type="string" calcext:value-type="string">
            <text:p>CoreFramework</text:p>
          </table:table-cell>
          <table:table-cell office:value-type="string" calcext:value-type="string">
            <text:p>True</text:p>
          </table:table-cell>
          <table:table-cell office:value-type="float" office:value="0.677419" calcext:value-type="float">
            <text:p>0.677419</text:p>
          </table:table-cell>
          <table:table-cell office:value-type="float" office:value="0.657625" calcext:value-type="float">
            <text:p>0.657625</text:p>
          </table:table-cell>
          <table:table-cell office:value-type="float" office:value="0.783088" calcext:value-type="float">
            <text:p>0.783088</text:p>
          </table:table-cell>
          <table:table-cell office:value-type="float" office:value="122.601151" calcext:value-type="float">
            <text:p>122.6011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ZR_MD</text:p>
          </table:table-cell>
          <table:table-cell office:value-type="string" calcext:value-type="string">
            <text:p>NeighborhoodHash</text:p>
          </table:table-cell>
          <table:table-cell office:value-type="string" calcext:value-type="string">
            <text:p>True</text:p>
          </table:table-cell>
          <table:table-cell office:value-type="float" office:value="0.580645" calcext:value-type="float">
            <text:p>0.580645</text:p>
          </table:table-cell>
          <table:table-cell office:value-type="float" office:value="0.52521" calcext:value-type="float">
            <text:p>0.52521</text:p>
          </table:table-cell>
          <table:table-cell office:value-type="float" office:value="0.518908" calcext:value-type="float">
            <text:p>0.518908</text:p>
          </table:table-cell>
          <table:table-cell office:value-type="float" office:value="4.592413" calcext:value-type="float">
            <text:p>4.5924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ZR_MD</text:p>
          </table:table-cell>
          <table:table-cell office:value-type="string" calcext:value-type="string">
            <text:p>PyramidMatch</text:p>
          </table:table-cell>
          <table:table-cell office:value-type="string" calcext:value-type="string">
            <text:p>True</text:p>
          </table:table-cell>
          <table:table-cell office:value-type="float" office:value="0.709677" calcext:value-type="float">
            <text:p>0.709677</text:p>
          </table:table-cell>
          <table:table-cell office:value-type="float" office:value="0.706576" calcext:value-type="float">
            <text:p>0.706576</text:p>
          </table:table-cell>
          <table:table-cell office:value-type="float" office:value="0.777311" calcext:value-type="float">
            <text:p>0.777311</text:p>
          </table:table-cell>
          <table:table-cell office:value-type="float" office:value="3.996927" calcext:value-type="float">
            <text:p>3.9969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SRC_21</text:p>
          </table:table-cell>
          <table:table-cell office:value-type="string" calcext:value-type="string">
            <text:p>OddSth</text:p>
          </table:table-cell>
          <table:table-cell office:value-type="string" calcext:value-type="string">
            <text:p>True</text:p>
          </table:table-cell>
          <table:table-cell office:value-type="float" office:value="0.716814" calcext:value-type="float">
            <text:p>0.716814</text:p>
          </table:table-cell>
          <table:table-cell office:value-type="float" office:value="0.711306" calcext:value-type="float">
            <text:p>0.711306</text:p>
          </table:table-cell>
          <table:table-cell office:value-type="float" office:value="0.971987" calcext:value-type="float">
            <text:p>0.971987</text:p>
          </table:table-cell>
          <table:table-cell office:value-type="float" office:value="158.475605" calcext:value-type="float">
            <text:p>158.475605</text:p>
          </table:table-cell>
          <table:table-cell table:formula="of:=MAX([.D20:.D28])" office:value-type="float" office:value="0.79646" calcext:value-type="float">
            <text:p>0.79646</text:p>
          </table:table-cell>
          <table:table-cell table:formula="of:=MAX([.E20:.E28])" office:value-type="float" office:value="0.791816" calcext:value-type="float">
            <text:p>0.791816</text:p>
          </table:table-cell>
          <table:table-cell table:formula="of:=MAX([.F20:.F28])" office:value-type="float" office:value="0.988514" calcext:value-type="float">
            <text:p>0.988514</text:p>
          </table:table-cell>
        </table:table-row>
        <table:table-row table:style-name="ro1">
          <table:table-cell office:value-type="string" calcext:value-type="string">
            <text:p>MSRC_21</text:p>
          </table:table-cell>
          <table:table-cell office:value-type="string" calcext:value-type="string">
            <text:p>GraphletSampling</text:p>
          </table:table-cell>
          <table:table-cell office:value-type="string" calcext:value-type="string">
            <text:p>True</text:p>
          </table:table-cell>
          <table:table-cell office:value-type="float" office:value="0.044248" calcext:value-type="float">
            <text:p>0.044248</text:p>
          </table:table-cell>
          <table:table-cell office:value-type="float" office:value="0.015437" calcext:value-type="float">
            <text:p>0.015437</text:p>
          </table:table-cell>
          <table:table-cell office:value-type="float" office:value="0.519563" calcext:value-type="float">
            <text:p>0.519563</text:p>
          </table:table-cell>
          <table:table-cell office:value-type="float" office:value="1718.722229" calcext:value-type="float">
            <text:p>1718.722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SRC_21</text:p>
          </table:table-cell>
          <table:table-cell office:value-type="string" calcext:value-type="string">
            <text:p>HadamardCode</text:p>
          </table:table-cell>
          <table:table-cell office:value-type="string" calcext:value-type="string">
            <text:p>True</text:p>
          </table:table-cell>
          <table:table-cell office:value-type="float" office:value="0.619469" calcext:value-type="float">
            <text:p>0.619469</text:p>
          </table:table-cell>
          <table:table-cell office:value-type="float" office:value="0.59734" calcext:value-type="float">
            <text:p>0.59734</text:p>
          </table:table-cell>
          <table:table-cell office:value-type="float" office:value="0.960411" calcext:value-type="float">
            <text:p>0.960411</text:p>
          </table:table-cell>
          <table:table-cell office:value-type="float" office:value="1.740723" calcext:value-type="float">
            <text:p>1.7407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SRC_21</text:p>
          </table:table-cell>
          <table:table-cell office:value-type="string" calcext:value-type="string">
            <text:p>WeisfeilerLehman</text:p>
          </table:table-cell>
          <table:table-cell office:value-type="string" calcext:value-type="string">
            <text:p>True</text:p>
          </table:table-cell>
          <table:table-cell office:value-type="float" office:value="0.637168" calcext:value-type="float">
            <text:p>0.637168</text:p>
          </table:table-cell>
          <table:table-cell office:value-type="float" office:value="0.633713" calcext:value-type="float">
            <text:p>0.633713</text:p>
          </table:table-cell>
          <table:table-cell office:value-type="float" office:value="0.965657" calcext:value-type="float">
            <text:p>0.965657</text:p>
          </table:table-cell>
          <table:table-cell office:value-type="float" office:value="1.043546" calcext:value-type="float">
            <text:p>1.0435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SRC_21</text:p>
          </table:table-cell>
          <table:table-cell office:value-type="string" calcext:value-type="string">
            <text:p>WeisfeilerLehmanOptimalAssignment</text:p>
          </table:table-cell>
          <table:table-cell office:value-type="string" calcext:value-type="string">
            <text:p>True</text:p>
          </table:table-cell>
          <table:table-cell office:value-type="float" office:value="0.787611" calcext:value-type="float">
            <text:p>0.787611</text:p>
          </table:table-cell>
          <table:table-cell office:value-type="float" office:value="0.767048" calcext:value-type="float">
            <text:p>0.767048</text:p>
          </table:table-cell>
          <table:table-cell office:value-type="float" office:value="0.98639" calcext:value-type="float">
            <text:p>0.98639</text:p>
          </table:table-cell>
          <table:table-cell office:value-type="float" office:value="69.781279" calcext:value-type="float">
            <text:p>69.7812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SRC_21</text:p>
          </table:table-cell>
          <table:table-cell office:value-type="string" calcext:value-type="string">
            <text:p>Propagation</text:p>
          </table:table-cell>
          <table:table-cell office:value-type="string" calcext:value-type="string">
            <text:p>True</text:p>
          </table:table-cell>
          <table:table-cell office:value-type="float" office:value="0.672566" calcext:value-type="float">
            <text:p>0.672566</text:p>
          </table:table-cell>
          <table:table-cell office:value-type="float" office:value="0.657708" calcext:value-type="float">
            <text:p>0.657708</text:p>
          </table:table-cell>
          <table:table-cell office:value-type="float" office:value="0.969401" calcext:value-type="float">
            <text:p>0.969401</text:p>
          </table:table-cell>
          <table:table-cell office:value-type="float" office:value="15.774153" calcext:value-type="float">
            <text:p>15.7741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SRC_21</text:p>
          </table:table-cell>
          <table:table-cell office:value-type="string" calcext:value-type="string">
            <text:p>CoreFramework</text:p>
          </table:table-cell>
          <table:table-cell office:value-type="string" calcext:value-type="string">
            <text:p>True</text:p>
          </table:table-cell>
          <table:table-cell office:value-type="float" office:value="0.734513" calcext:value-type="float">
            <text:p>0.734513</text:p>
          </table:table-cell>
          <table:table-cell office:value-type="float" office:value="0.740659" calcext:value-type="float">
            <text:p>0.740659</text:p>
          </table:table-cell>
          <table:table-cell office:value-type="float" office:value="0.973383" calcext:value-type="float">
            <text:p>0.973383</text:p>
          </table:table-cell>
          <table:table-cell office:value-type="float" office:value="233.337414" calcext:value-type="float">
            <text:p>233.3374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SRC_21</text:p>
          </table:table-cell>
          <table:table-cell office:value-type="string" calcext:value-type="string">
            <text:p>NeighborhoodHash</text:p>
          </table:table-cell>
          <table:table-cell office:value-type="string" calcext:value-type="string">
            <text:p>True</text:p>
          </table:table-cell>
          <table:table-cell office:value-type="float" office:value="0.681416" calcext:value-type="float">
            <text:p>0.681416</text:p>
          </table:table-cell>
          <table:table-cell office:value-type="float" office:value="0.643694" calcext:value-type="float">
            <text:p>0.643694</text:p>
          </table:table-cell>
          <table:table-cell office:value-type="float" office:value="0.965641" calcext:value-type="float">
            <text:p>0.965641</text:p>
          </table:table-cell>
          <table:table-cell office:value-type="float" office:value="32.029065" calcext:value-type="float">
            <text:p>32.0290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SRC_21</text:p>
          </table:table-cell>
          <table:table-cell office:value-type="string" calcext:value-type="string">
            <text:p>PyramidMatch</text:p>
          </table:table-cell>
          <table:table-cell office:value-type="string" calcext:value-type="string">
            <text:p>True</text:p>
          </table:table-cell>
          <table:table-cell office:value-type="float" office:value="0.79646" calcext:value-type="float">
            <text:p>0.79646</text:p>
          </table:table-cell>
          <table:table-cell office:value-type="float" office:value="0.791816" calcext:value-type="float">
            <text:p>0.791816</text:p>
          </table:table-cell>
          <table:table-cell office:value-type="float" office:value="0.988514" calcext:value-type="float">
            <text:p>0.988514</text:p>
          </table:table-cell>
          <table:table-cell office:value-type="float" office:value="17.289265" calcext:value-type="float">
            <text:p>17.2892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SRC_9</text:p>
          </table:table-cell>
          <table:table-cell office:value-type="string" calcext:value-type="string">
            <text:p>OddSth</text:p>
          </table:table-cell>
          <table:table-cell office:value-type="string" calcext:value-type="string">
            <text:p>True</text:p>
          </table:table-cell>
          <table:table-cell office:value-type="float" office:value="0.755556" calcext:value-type="float">
            <text:p>0.755556</text:p>
          </table:table-cell>
          <table:table-cell office:value-type="float" office:value="0.719621" calcext:value-type="float">
            <text:p>0.719621</text:p>
          </table:table-cell>
          <table:table-cell office:value-type="float" office:value="0.976792" calcext:value-type="float">
            <text:p>0.976792</text:p>
          </table:table-cell>
          <table:table-cell office:value-type="float" office:value="14.188236" calcext:value-type="float">
            <text:p>14.188236</text:p>
          </table:table-cell>
          <table:table-cell table:formula="of:=MAX([.D29:.D37])" office:value-type="float" office:value="0.866667" calcext:value-type="float">
            <text:p>0.866667</text:p>
          </table:table-cell>
          <table:table-cell table:formula="of:=MAX([.E29:.E37])" office:value-type="float" office:value="0.858861" calcext:value-type="float">
            <text:p>0.858861</text:p>
          </table:table-cell>
          <table:table-cell table:formula="of:=MAX([.F29:.F37])" office:value-type="float" office:value="0.985556" calcext:value-type="float">
            <text:p>0.985556</text:p>
          </table:table-cell>
        </table:table-row>
        <table:table-row table:style-name="ro1">
          <table:table-cell office:value-type="string" calcext:value-type="string">
            <text:p>MSRC_9</text:p>
          </table:table-cell>
          <table:table-cell office:value-type="string" calcext:value-type="string">
            <text:p>GraphletSampling</text:p>
          </table:table-cell>
          <table:table-cell office:value-type="string" calcext:value-type="string">
            <text:p>True</text:p>
          </table:table-cell>
          <table:table-cell office:value-type="float" office:value="0.088889" calcext:value-type="float">
            <text:p>0.088889</text:p>
          </table:table-cell>
          <table:table-cell office:value-type="float" office:value="0.051667" calcext:value-type="float">
            <text:p>0.051667</text:p>
          </table:table-cell>
          <table:table-cell office:value-type="float" office:value="0.542688" calcext:value-type="float">
            <text:p>0.542688</text:p>
          </table:table-cell>
          <table:table-cell office:value-type="float" office:value="324.684101" calcext:value-type="float">
            <text:p>324.6841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SRC_9</text:p>
          </table:table-cell>
          <table:table-cell office:value-type="string" calcext:value-type="string">
            <text:p>HadamardCode</text:p>
          </table:table-cell>
          <table:table-cell office:value-type="string" calcext:value-type="string">
            <text:p>True</text:p>
          </table:table-cell>
          <table:table-cell office:value-type="float" office:value="0.822222" calcext:value-type="float">
            <text:p>0.822222</text:p>
          </table:table-cell>
          <table:table-cell office:value-type="float" office:value="0.803923" calcext:value-type="float">
            <text:p>0.803923</text:p>
          </table:table-cell>
          <table:table-cell office:value-type="float" office:value="0.973929" calcext:value-type="float">
            <text:p>0.973929</text:p>
          </table:table-cell>
          <table:table-cell office:value-type="float" office:value="0.695648" calcext:value-type="float">
            <text:p>0.6956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SRC_9</text:p>
          </table:table-cell>
          <table:table-cell office:value-type="string" calcext:value-type="string">
            <text:p>WeisfeilerLehman</text:p>
          </table:table-cell>
          <table:table-cell office:value-type="string" calcext:value-type="string">
            <text:p>True</text:p>
          </table:table-cell>
          <table:table-cell office:value-type="float" office:value="0.8" calcext:value-type="float">
            <text:p>0.8</text:p>
          </table:table-cell>
          <table:table-cell office:value-type="float" office:value="0.761595" calcext:value-type="float">
            <text:p>0.761595</text:p>
          </table:table-cell>
          <table:table-cell office:value-type="float" office:value="0.981964" calcext:value-type="float">
            <text:p>0.981964</text:p>
          </table:table-cell>
          <table:table-cell office:value-type="float" office:value="0.480368" calcext:value-type="float">
            <text:p>0.4803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SRC_9</text:p>
          </table:table-cell>
          <table:table-cell office:value-type="string" calcext:value-type="string">
            <text:p>WeisfeilerLehmanOptimalAssignment</text:p>
          </table:table-cell>
          <table:table-cell office:value-type="string" calcext:value-type="string">
            <text:p>True</text:p>
          </table:table-cell>
          <table:table-cell office:value-type="float" office:value="0.844444" calcext:value-type="float">
            <text:p>0.844444</text:p>
          </table:table-cell>
          <table:table-cell office:value-type="float" office:value="0.836484" calcext:value-type="float">
            <text:p>0.836484</text:p>
          </table:table-cell>
          <table:table-cell office:value-type="float" office:value="0.971521" calcext:value-type="float">
            <text:p>0.971521</text:p>
          </table:table-cell>
          <table:table-cell office:value-type="float" office:value="4.438972" calcext:value-type="float">
            <text:p>4.4389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SRC_9</text:p>
          </table:table-cell>
          <table:table-cell office:value-type="string" calcext:value-type="string">
            <text:p>Propagation</text:p>
          </table:table-cell>
          <table:table-cell office:value-type="string" calcext:value-type="string">
            <text:p>True</text:p>
          </table:table-cell>
          <table:table-cell office:value-type="float" office:value="0.866667" calcext:value-type="float">
            <text:p>0.866667</text:p>
          </table:table-cell>
          <table:table-cell office:value-type="float" office:value="0.858861" calcext:value-type="float">
            <text:p>0.858861</text:p>
          </table:table-cell>
          <table:table-cell office:value-type="float" office:value="0.982361" calcext:value-type="float">
            <text:p>0.982361</text:p>
          </table:table-cell>
          <table:table-cell office:value-type="float" office:value="1.749638" calcext:value-type="float">
            <text:p>1.7496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SRC_9</text:p>
          </table:table-cell>
          <table:table-cell office:value-type="string" calcext:value-type="string">
            <text:p>CoreFramework</text:p>
          </table:table-cell>
          <table:table-cell office:value-type="string" calcext:value-type="string">
            <text:p>True</text:p>
          </table:table-cell>
          <table:table-cell office:value-type="float" office:value="0.8" calcext:value-type="float">
            <text:p>0.8</text:p>
          </table:table-cell>
          <table:table-cell office:value-type="float" office:value="0.761595" calcext:value-type="float">
            <text:p>0.761595</text:p>
          </table:table-cell>
          <table:table-cell office:value-type="float" office:value="0.970853" calcext:value-type="float">
            <text:p>0.970853</text:p>
          </table:table-cell>
          <table:table-cell office:value-type="float" office:value="23.379277" calcext:value-type="float">
            <text:p>23.3792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SRC_9</text:p>
          </table:table-cell>
          <table:table-cell office:value-type="string" calcext:value-type="string">
            <text:p>NeighborhoodHash</text:p>
          </table:table-cell>
          <table:table-cell office:value-type="string" calcext:value-type="string">
            <text:p>True</text:p>
          </table:table-cell>
          <table:table-cell office:value-type="float" office:value="0.711111" calcext:value-type="float">
            <text:p>0.711111</text:p>
          </table:table-cell>
          <table:table-cell office:value-type="float" office:value="0.686496" calcext:value-type="float">
            <text:p>0.686496</text:p>
          </table:table-cell>
          <table:table-cell office:value-type="float" office:value="0.985556" calcext:value-type="float">
            <text:p>0.985556</text:p>
          </table:table-cell>
          <table:table-cell office:value-type="float" office:value="3.303638" calcext:value-type="float">
            <text:p>3.3036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SRC_9</text:p>
          </table:table-cell>
          <table:table-cell office:value-type="string" calcext:value-type="string">
            <text:p>PyramidMatch</text:p>
          </table:table-cell>
          <table:table-cell office:value-type="string" calcext:value-type="string">
            <text:p>True</text:p>
          </table:table-cell>
          <table:table-cell office:value-type="float" office:value="0.8" calcext:value-type="float">
            <text:p>0.8</text:p>
          </table:table-cell>
          <table:table-cell office:value-type="float" office:value="0.761595" calcext:value-type="float">
            <text:p>0.761595</text:p>
          </table:table-cell>
          <table:table-cell office:value-type="float" office:value="0.981012" calcext:value-type="float">
            <text:p>0.981012</text:p>
          </table:table-cell>
          <table:table-cell office:value-type="float" office:value="2.924717" calcext:value-type="float">
            <text:p>2.9247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ZYMES</text:p>
          </table:table-cell>
          <table:table-cell office:value-type="string" calcext:value-type="string">
            <text:p>OddSth</text:p>
          </table:table-cell>
          <table:table-cell office:value-type="string" calcext:value-type="string">
            <text:p>True</text:p>
          </table:table-cell>
          <table:table-cell office:value-type="float" office:value="0.208333" calcext:value-type="float">
            <text:p>0.208333</text:p>
          </table:table-cell>
          <table:table-cell office:value-type="float" office:value="0.202123" calcext:value-type="float">
            <text:p>0.202123</text:p>
          </table:table-cell>
          <table:table-cell office:value-type="float" office:value="0.609593" calcext:value-type="float">
            <text:p>0.609593</text:p>
          </table:table-cell>
          <table:table-cell office:value-type="float" office:value="24.696526" calcext:value-type="float">
            <text:p>24.696526</text:p>
          </table:table-cell>
          <table:table-cell table:formula="of:=MAX([.D38:.D46])" office:value-type="float" office:value="0.458333" calcext:value-type="float">
            <text:p>0.458333</text:p>
          </table:table-cell>
          <table:table-cell table:formula="of:=MAX([.E38:.E46])" office:value-type="float" office:value="0.455035" calcext:value-type="float">
            <text:p>0.455035</text:p>
          </table:table-cell>
          <table:table-cell table:formula="of:=MAX([.F38:.F46])" office:value-type="float" office:value="0.772829" calcext:value-type="float">
            <text:p>0.772829</text:p>
          </table:table-cell>
        </table:table-row>
        <table:table-row table:style-name="ro1">
          <table:table-cell office:value-type="string" calcext:value-type="string">
            <text:p>ENZYMES</text:p>
          </table:table-cell>
          <table:table-cell office:value-type="string" calcext:value-type="string">
            <text:p>GraphletSampling</text:p>
          </table:table-cell>
          <table:table-cell office:value-type="string" calcext:value-type="string">
            <text:p>True</text:p>
          </table:table-cell>
          <table:table-cell office:value-type="float" office:value="0.283333" calcext:value-type="float">
            <text:p>0.283333</text:p>
          </table:table-cell>
          <table:table-cell office:value-type="float" office:value="0.184131" calcext:value-type="float">
            <text:p>0.184131</text:p>
          </table:table-cell>
          <table:table-cell office:value-type="float" office:value="0.648714" calcext:value-type="float">
            <text:p>0.648714</text:p>
          </table:table-cell>
          <table:table-cell office:value-type="float" office:value="165.934015" calcext:value-type="float">
            <text:p>165.9340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ZYMES</text:p>
          </table:table-cell>
          <table:table-cell office:value-type="string" calcext:value-type="string">
            <text:p>HadamardCode</text:p>
          </table:table-cell>
          <table:table-cell office:value-type="string" calcext:value-type="string">
            <text:p>True</text:p>
          </table:table-cell>
          <table:table-cell office:value-type="float" office:value="0.291667" calcext:value-type="float">
            <text:p>0.291667</text:p>
          </table:table-cell>
          <table:table-cell office:value-type="float" office:value="0.288353" calcext:value-type="float">
            <text:p>0.288353</text:p>
          </table:table-cell>
          <table:table-cell office:value-type="float" office:value="0.613758" calcext:value-type="float">
            <text:p>0.613758</text:p>
          </table:table-cell>
          <table:table-cell office:value-type="float" office:value="1.108794" calcext:value-type="float">
            <text:p>1.1087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ZYMES</text:p>
          </table:table-cell>
          <table:table-cell office:value-type="string" calcext:value-type="string">
            <text:p>WeisfeilerLehman</text:p>
          </table:table-cell>
          <table:table-cell office:value-type="string" calcext:value-type="string">
            <text:p>True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.416741" calcext:value-type="float">
            <text:p>0.416741</text:p>
          </table:table-cell>
          <table:table-cell office:value-type="float" office:value="0.720522" calcext:value-type="float">
            <text:p>0.720522</text:p>
          </table:table-cell>
          <table:table-cell office:value-type="float" office:value="0.984464" calcext:value-type="float">
            <text:p>0.9844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ZYMES</text:p>
          </table:table-cell>
          <table:table-cell office:value-type="string" calcext:value-type="string">
            <text:p>WeisfeilerLehmanOptimalAssignment</text:p>
          </table:table-cell>
          <table:table-cell office:value-type="string" calcext:value-type="string">
            <text:p>True</text:p>
          </table:table-cell>
          <table:table-cell office:value-type="float" office:value="0.458333" calcext:value-type="float">
            <text:p>0.458333</text:p>
          </table:table-cell>
          <table:table-cell office:value-type="float" office:value="0.455035" calcext:value-type="float">
            <text:p>0.455035</text:p>
          </table:table-cell>
          <table:table-cell office:value-type="float" office:value="0.772829" calcext:value-type="float">
            <text:p>0.772829</text:p>
          </table:table-cell>
          <table:table-cell office:value-type="float" office:value="42.303623" calcext:value-type="float">
            <text:p>42.3036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ZYMES</text:p>
          </table:table-cell>
          <table:table-cell office:value-type="string" calcext:value-type="string">
            <text:p>Propagation</text:p>
          </table:table-cell>
          <table:table-cell office:value-type="string" calcext:value-type="string">
            <text:p>True</text:p>
          </table:table-cell>
          <table:table-cell office:value-type="float" office:value="0.433333" calcext:value-type="float">
            <text:p>0.433333</text:p>
          </table:table-cell>
          <table:table-cell office:value-type="float" office:value="0.431653" calcext:value-type="float">
            <text:p>0.431653</text:p>
          </table:table-cell>
          <table:table-cell office:value-type="float" office:value="0.754636" calcext:value-type="float">
            <text:p>0.754636</text:p>
          </table:table-cell>
          <table:table-cell office:value-type="float" office:value="8.322744" calcext:value-type="float">
            <text:p>8.3227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ZYMES</text:p>
          </table:table-cell>
          <table:table-cell office:value-type="string" calcext:value-type="string">
            <text:p>CoreFramework</text:p>
          </table:table-cell>
          <table:table-cell office:value-type="string" calcext:value-type="string">
            <text:p>True</text:p>
          </table:table-cell>
          <table:table-cell office:value-type="float" office:value="0.358333" calcext:value-type="float">
            <text:p>0.358333</text:p>
          </table:table-cell>
          <table:table-cell office:value-type="float" office:value="0.37192" calcext:value-type="float">
            <text:p>0.37192</text:p>
          </table:table-cell>
          <table:table-cell office:value-type="float" office:value="0.740689" calcext:value-type="float">
            <text:p>0.740689</text:p>
          </table:table-cell>
          <table:table-cell office:value-type="float" office:value="36.445614" calcext:value-type="float">
            <text:p>36.4456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ZYMES</text:p>
          </table:table-cell>
          <table:table-cell office:value-type="string" calcext:value-type="string">
            <text:p>NeighborhoodHash</text:p>
          </table:table-cell>
          <table:table-cell office:value-type="string" calcext:value-type="string">
            <text:p>True</text:p>
          </table:table-cell>
          <table:table-cell office:value-type="float" office:value="0.45" calcext:value-type="float">
            <text:p>0.45</text:p>
          </table:table-cell>
          <table:table-cell office:value-type="float" office:value="0.447287" calcext:value-type="float">
            <text:p>0.447287</text:p>
          </table:table-cell>
          <table:table-cell office:value-type="float" office:value="0.7564" calcext:value-type="float">
            <text:p>0.7564</text:p>
          </table:table-cell>
          <table:table-cell office:value-type="float" office:value="12.973492" calcext:value-type="float">
            <text:p>12.9734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ZYMES</text:p>
          </table:table-cell>
          <table:table-cell office:value-type="string" calcext:value-type="string">
            <text:p>PyramidMatch</text:p>
          </table:table-cell>
          <table:table-cell office:value-type="string" calcext:value-type="string">
            <text:p>True</text:p>
          </table:table-cell>
          <table:table-cell office:value-type="float" office:value="0.366667" calcext:value-type="float">
            <text:p>0.366667</text:p>
          </table:table-cell>
          <table:table-cell office:value-type="float" office:value="0.37148" calcext:value-type="float">
            <text:p>0.37148</text:p>
          </table:table-cell>
          <table:table-cell office:value-type="float" office:value="0.69248" calcext:value-type="float">
            <text:p>0.69248</text:p>
          </table:table-cell>
          <table:table-cell office:value-type="float" office:value="13.510187" calcext:value-type="float">
            <text:p>13.5101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DS</text:p>
          </table:table-cell>
          <table:table-cell office:value-type="string" calcext:value-type="string">
            <text:p>OddSth</text:p>
          </table:table-cell>
          <table:table-cell office:value-type="string" calcext:value-type="string">
            <text:p>True</text:p>
          </table:table-cell>
          <table:table-cell office:value-type="float" office:value="0.8475" calcext:value-type="float">
            <text:p>0.8475</text:p>
          </table:table-cell>
          <table:table-cell office:value-type="float" office:value="0.84027" calcext:value-type="float">
            <text:p>0.84027</text:p>
          </table:table-cell>
          <table:table-cell office:value-type="float" office:value="0.906606" calcext:value-type="float">
            <text:p>0.906606</text:p>
          </table:table-cell>
          <table:table-cell office:value-type="float" office:value="40.928061" calcext:value-type="float">
            <text:p>40.928061</text:p>
          </table:table-cell>
          <table:table-cell table:formula="of:=MAX([.D47:.D55])" office:value-type="float" office:value="0.99" calcext:value-type="float">
            <text:p>0.99</text:p>
          </table:table-cell>
          <table:table-cell table:formula="of:=MAX([.E47:.E55])" office:value-type="float" office:value="0.989957" calcext:value-type="float">
            <text:p>0.989957</text:p>
          </table:table-cell>
          <table:table-cell table:formula="of:=MAX([.F47:.F55])" office:value-type="float" office:value="0.985002" calcext:value-type="float">
            <text:p>0.985002</text:p>
          </table:table-cell>
        </table:table-row>
        <table:table-row table:style-name="ro1">
          <table:table-cell office:value-type="string" calcext:value-type="string">
            <text:p>AIDS</text:p>
          </table:table-cell>
          <table:table-cell office:value-type="string" calcext:value-type="string">
            <text:p>GraphletSampling</text:p>
          </table:table-cell>
          <table:table-cell office:value-type="string" calcext:value-type="string">
            <text:p>True</text:p>
          </table:table-cell>
          <table:table-cell office:value-type="float" office:value="0.785" calcext:value-type="float">
            <text:p>0.785</text:p>
          </table:table-cell>
          <table:table-cell office:value-type="float" office:value="0.690448" calcext:value-type="float">
            <text:p>0.690448</text:p>
          </table:table-cell>
          <table:table-cell office:value-type="float" office:value="0.952655" calcext:value-type="float">
            <text:p>0.952655</text:p>
          </table:table-cell>
          <table:table-cell office:value-type="float" office:value="27.340824" calcext:value-type="float">
            <text:p>27.3408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DS</text:p>
          </table:table-cell>
          <table:table-cell office:value-type="string" calcext:value-type="string">
            <text:p>HadamardCode</text:p>
          </table:table-cell>
          <table:table-cell office:value-type="string" calcext:value-type="string">
            <text:p>True</text:p>
          </table:table-cell>
          <table:table-cell office:value-type="float" office:value="0.9875" calcext:value-type="float">
            <text:p>0.9875</text:p>
          </table:table-cell>
          <table:table-cell office:value-type="float" office:value="0.987362" calcext:value-type="float">
            <text:p>0.987362</text:p>
          </table:table-cell>
          <table:table-cell office:value-type="float" office:value="0.982558" calcext:value-type="float">
            <text:p>0.982558</text:p>
          </table:table-cell>
          <table:table-cell office:value-type="float" office:value="3.742148" calcext:value-type="float">
            <text:p>3.7421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DS</text:p>
          </table:table-cell>
          <table:table-cell office:value-type="string" calcext:value-type="string">
            <text:p>WeisfeilerLehman</text:p>
          </table:table-cell>
          <table:table-cell office:value-type="string" calcext:value-type="string">
            <text:p>True</text:p>
          </table:table-cell>
          <table:table-cell office:value-type="float" office:value="0.9725" calcext:value-type="float">
            <text:p>0.9725</text:p>
          </table:table-cell>
          <table:table-cell office:value-type="float" office:value="0.971797" calcext:value-type="float">
            <text:p>0.971797</text:p>
          </table:table-cell>
          <table:table-cell office:value-type="float" office:value="0.9773" calcext:value-type="float">
            <text:p>0.9773</text:p>
          </table:table-cell>
          <table:table-cell office:value-type="float" office:value="1.528277" calcext:value-type="float">
            <text:p>1.5282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DS</text:p>
          </table:table-cell>
          <table:table-cell office:value-type="string" calcext:value-type="string">
            <text:p>WeisfeilerLehmanOptimalAssignment</text:p>
          </table:table-cell>
          <table:table-cell office:value-type="string" calcext:value-type="string">
            <text:p>True</text:p>
          </table:table-cell>
          <table:table-cell office:value-type="float" office:value="0.99" calcext:value-type="float">
            <text:p>0.99</text:p>
          </table:table-cell>
          <table:table-cell office:value-type="float" office:value="0.989913" calcext:value-type="float">
            <text:p>0.989913</text:p>
          </table:table-cell>
          <table:table-cell office:value-type="float" office:value="0.981336" calcext:value-type="float">
            <text:p>0.981336</text:p>
          </table:table-cell>
          <table:table-cell office:value-type="float" office:value="390.26994" calcext:value-type="float">
            <text:p>390.269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DS</text:p>
          </table:table-cell>
          <table:table-cell office:value-type="string" calcext:value-type="string">
            <text:p>Propagation</text:p>
          </table:table-cell>
          <table:table-cell office:value-type="string" calcext:value-type="string">
            <text:p>True</text:p>
          </table:table-cell>
          <table:table-cell office:value-type="float" office:value="0.945" calcext:value-type="float">
            <text:p>0.945</text:p>
          </table:table-cell>
          <table:table-cell office:value-type="float" office:value="0.944764" calcext:value-type="float">
            <text:p>0.944764</text:p>
          </table:table-cell>
          <table:table-cell office:value-type="float" office:value="0.958006" calcext:value-type="float">
            <text:p>0.958006</text:p>
          </table:table-cell>
          <table:table-cell office:value-type="float" office:value="50.636605" calcext:value-type="float">
            <text:p>50.6366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DS</text:p>
          </table:table-cell>
          <table:table-cell office:value-type="string" calcext:value-type="string">
            <text:p>CoreFramework</text:p>
          </table:table-cell>
          <table:table-cell office:value-type="string" calcext:value-type="string">
            <text:p>True</text:p>
          </table:table-cell>
          <table:table-cell office:value-type="float" office:value="0.99" calcext:value-type="float">
            <text:p>0.99</text:p>
          </table:table-cell>
          <table:table-cell office:value-type="float" office:value="0.989957" calcext:value-type="float">
            <text:p>0.989957</text:p>
          </table:table-cell>
          <table:table-cell office:value-type="float" office:value="0.985002" calcext:value-type="float">
            <text:p>0.985002</text:p>
          </table:table-cell>
          <table:table-cell office:value-type="float" office:value="26.31085" calcext:value-type="float">
            <text:p>26.310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DS</text:p>
          </table:table-cell>
          <table:table-cell office:value-type="string" calcext:value-type="string">
            <text:p>NeighborhoodHash</text:p>
          </table:table-cell>
          <table:table-cell office:value-type="string" calcext:value-type="string">
            <text:p>True</text:p>
          </table:table-cell>
          <table:table-cell office:value-type="float" office:value="0.99" calcext:value-type="float">
            <text:p>0.99</text:p>
          </table:table-cell>
          <table:table-cell office:value-type="float" office:value="0.989913" calcext:value-type="float">
            <text:p>0.989913</text:p>
          </table:table-cell>
          <table:table-cell office:value-type="float" office:value="0.98004" calcext:value-type="float">
            <text:p>0.98004</text:p>
          </table:table-cell>
          <table:table-cell office:value-type="float" office:value="67.87666" calcext:value-type="float">
            <text:p>67.876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DS</text:p>
          </table:table-cell>
          <table:table-cell office:value-type="string" calcext:value-type="string">
            <text:p>PyramidMatch</text:p>
          </table:table-cell>
          <table:table-cell office:value-type="string" calcext:value-type="string">
            <text:p>True</text:p>
          </table:table-cell>
          <table:table-cell office:value-type="float" office:value="0.99" calcext:value-type="float">
            <text:p>0.99</text:p>
          </table:table-cell>
          <table:table-cell office:value-type="float" office:value="0.989913" calcext:value-type="float">
            <text:p>0.989913</text:p>
          </table:table-cell>
          <table:table-cell office:value-type="float" office:value="0.984262" calcext:value-type="float">
            <text:p>0.984262</text:p>
          </table:table-cell>
          <table:table-cell office:value-type="float" office:value="132.124941" calcext:value-type="float">
            <text:p>132.1249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X2_MD</text:p>
          </table:table-cell>
          <table:table-cell office:value-type="string" calcext:value-type="string">
            <text:p>OddSth</text:p>
          </table:table-cell>
          <table:table-cell office:value-type="string" calcext:value-type="string">
            <text:p>True</text:p>
          </table:table-cell>
          <table:table-cell office:value-type="float" office:value="0.622951" calcext:value-type="float">
            <text:p>0.622951</text:p>
          </table:table-cell>
          <table:table-cell office:value-type="float" office:value="0.623776" calcext:value-type="float">
            <text:p>0.623776</text:p>
          </table:table-cell>
          <table:table-cell office:value-type="float" office:value="0.702747" calcext:value-type="float">
            <text:p>0.702747</text:p>
          </table:table-cell>
          <table:table-cell office:value-type="float" office:value="4.43677" calcext:value-type="float">
            <text:p>4.43677</text:p>
          </table:table-cell>
          <table:table-cell table:formula="of:=MAX([.D56:.D64])" office:value-type="float" office:value="0.639344" calcext:value-type="float">
            <text:p>0.639344</text:p>
          </table:table-cell>
          <table:table-cell table:formula="of:=MAX([.E56:.E64])" office:value-type="float" office:value="0.640719" calcext:value-type="float">
            <text:p>0.640719</text:p>
          </table:table-cell>
          <table:table-cell table:formula="of:=MAX([.F56:.F64])" office:value-type="float" office:value="0.751099" calcext:value-type="float">
            <text:p>0.751099</text:p>
          </table:table-cell>
        </table:table-row>
        <table:table-row table:style-name="ro1">
          <table:table-cell office:value-type="string" calcext:value-type="string">
            <text:p>COX2_MD</text:p>
          </table:table-cell>
          <table:table-cell office:value-type="string" calcext:value-type="string">
            <text:p>GraphletSampling</text:p>
          </table:table-cell>
          <table:table-cell office:value-type="string" calcext:value-type="string">
            <text:p>True</text:p>
          </table:table-cell>
          <table:table-cell office:value-type="float" office:value="0.42623" calcext:value-type="float">
            <text:p>0.42623</text:p>
          </table:table-cell>
          <table:table-cell office:value-type="float" office:value="0.254758" calcext:value-type="float">
            <text:p>0.254758</text:p>
          </table:table-cell>
          <table:table-cell office:value-type="float" office:value="0.5" calcext:value-type="float">
            <text:p>0.5</text:p>
          </table:table-cell>
          <table:table-cell office:value-type="float" office:value="10002.555742" calcext:value-type="float">
            <text:p>10002.5557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X2_MD</text:p>
          </table:table-cell>
          <table:table-cell office:value-type="string" calcext:value-type="string">
            <text:p>HadamardCode</text:p>
          </table:table-cell>
          <table:table-cell office:value-type="string" calcext:value-type="string">
            <text:p>True</text:p>
          </table:table-cell>
          <table:table-cell office:value-type="float" office:value="0.606557" calcext:value-type="float">
            <text:p>0.606557</text:p>
          </table:table-cell>
          <table:table-cell office:value-type="float" office:value="0.589047" calcext:value-type="float">
            <text:p>0.589047</text:p>
          </table:table-cell>
          <table:table-cell office:value-type="float" office:value="0.736813" calcext:value-type="float">
            <text:p>0.736813</text:p>
          </table:table-cell>
          <table:table-cell office:value-type="float" office:value="1.709762" calcext:value-type="float">
            <text:p>1.7097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X2_MD</text:p>
          </table:table-cell>
          <table:table-cell office:value-type="string" calcext:value-type="string">
            <text:p>WeisfeilerLehman</text:p>
          </table:table-cell>
          <table:table-cell office:value-type="string" calcext:value-type="string">
            <text:p>True</text:p>
          </table:table-cell>
          <table:table-cell office:value-type="float" office:value="0.590164" calcext:value-type="float">
            <text:p>0.590164</text:p>
          </table:table-cell>
          <table:table-cell office:value-type="float" office:value="0.568659" calcext:value-type="float">
            <text:p>0.568659</text:p>
          </table:table-cell>
          <table:table-cell office:value-type="float" office:value="0.73956" calcext:value-type="float">
            <text:p>0.73956</text:p>
          </table:table-cell>
          <table:table-cell office:value-type="float" office:value="0.984113" calcext:value-type="float">
            <text:p>0.9841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X2_MD</text:p>
          </table:table-cell>
          <table:table-cell office:value-type="string" calcext:value-type="string">
            <text:p>WeisfeilerLehmanOptimalAssignment</text:p>
          </table:table-cell>
          <table:table-cell office:value-type="string" calcext:value-type="string">
            <text:p>True</text:p>
          </table:table-cell>
          <table:table-cell office:value-type="float" office:value="0.590164" calcext:value-type="float">
            <text:p>0.590164</text:p>
          </table:table-cell>
          <table:table-cell office:value-type="float" office:value="0.568659" calcext:value-type="float">
            <text:p>0.568659</text:p>
          </table:table-cell>
          <table:table-cell office:value-type="float" office:value="0.751099" calcext:value-type="float">
            <text:p>0.751099</text:p>
          </table:table-cell>
          <table:table-cell office:value-type="float" office:value="3.055526" calcext:value-type="float">
            <text:p>3.0555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X2_MD</text:p>
          </table:table-cell>
          <table:table-cell office:value-type="string" calcext:value-type="string">
            <text:p>Propagation</text:p>
          </table:table-cell>
          <table:table-cell office:value-type="string" calcext:value-type="string">
            <text:p>True</text:p>
          </table:table-cell>
          <table:table-cell office:value-type="float" office:value="0.639344" calcext:value-type="float">
            <text:p>0.639344</text:p>
          </table:table-cell>
          <table:table-cell office:value-type="float" office:value="0.64012" calcext:value-type="float">
            <text:p>0.64012</text:p>
          </table:table-cell>
          <table:table-cell office:value-type="float" office:value="0.655495" calcext:value-type="float">
            <text:p>0.655495</text:p>
          </table:table-cell>
          <table:table-cell office:value-type="float" office:value="1.094853" calcext:value-type="float">
            <text:p>1.0948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X2_MD</text:p>
          </table:table-cell>
          <table:table-cell office:value-type="string" calcext:value-type="string">
            <text:p>CoreFramework</text:p>
          </table:table-cell>
          <table:table-cell office:value-type="string" calcext:value-type="string">
            <text:p>True</text:p>
          </table:table-cell>
          <table:table-cell office:value-type="float" office:value="0.606557" calcext:value-type="float">
            <text:p>0.606557</text:p>
          </table:table-cell>
          <table:table-cell office:value-type="float" office:value="0.608057" calcext:value-type="float">
            <text:p>0.608057</text:p>
          </table:table-cell>
          <table:table-cell office:value-type="float" office:value="0.671978" calcext:value-type="float">
            <text:p>0.671978</text:p>
          </table:table-cell>
          <table:table-cell office:value-type="float" office:value="224.060525" calcext:value-type="float">
            <text:p>224.0605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X2_MD</text:p>
          </table:table-cell>
          <table:table-cell office:value-type="string" calcext:value-type="string">
            <text:p>NeighborhoodHash</text:p>
          </table:table-cell>
          <table:table-cell office:value-type="string" calcext:value-type="string">
            <text:p>True</text:p>
          </table:table-cell>
          <table:table-cell office:value-type="float" office:value="0.57377" calcext:value-type="float">
            <text:p>0.57377</text:p>
          </table:table-cell>
          <table:table-cell office:value-type="float" office:value="0.539451" calcext:value-type="float">
            <text:p>0.539451</text:p>
          </table:table-cell>
          <table:table-cell office:value-type="float" office:value="0.613736" calcext:value-type="float">
            <text:p>0.613736</text:p>
          </table:table-cell>
          <table:table-cell office:value-type="float" office:value="6.84078" calcext:value-type="float">
            <text:p>6.840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X2_MD</text:p>
          </table:table-cell>
          <table:table-cell office:value-type="string" calcext:value-type="string">
            <text:p>PyramidMatch</text:p>
          </table:table-cell>
          <table:table-cell office:value-type="string" calcext:value-type="string">
            <text:p>True</text:p>
          </table:table-cell>
          <table:table-cell office:value-type="float" office:value="0.639344" calcext:value-type="float">
            <text:p>0.639344</text:p>
          </table:table-cell>
          <table:table-cell office:value-type="float" office:value="0.640719" calcext:value-type="float">
            <text:p>0.640719</text:p>
          </table:table-cell>
          <table:table-cell office:value-type="float" office:value="0.735165" calcext:value-type="float">
            <text:p>0.735165</text:p>
          </table:table-cell>
          <table:table-cell office:value-type="float" office:value="4.18354" calcext:value-type="float">
            <text:p>4.183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HFR_MD</text:p>
          </table:table-cell>
          <table:table-cell office:value-type="string" calcext:value-type="string">
            <text:p>OddSth</text:p>
          </table:table-cell>
          <table:table-cell office:value-type="string" calcext:value-type="string">
            <text:p>True</text:p>
          </table:table-cell>
          <table:table-cell office:value-type="float" office:value="0.746835" calcext:value-type="float">
            <text:p>0.746835</text:p>
          </table:table-cell>
          <table:table-cell office:value-type="float" office:value="0.650376" calcext:value-type="float">
            <text:p>0.650376</text:p>
          </table:table-cell>
          <table:table-cell office:value-type="float" office:value="0.584975" calcext:value-type="float">
            <text:p>0.584975</text:p>
          </table:table-cell>
          <table:table-cell office:value-type="float" office:value="4.639671" calcext:value-type="float">
            <text:p>4.639671</text:p>
          </table:table-cell>
          <table:table-cell table:formula="of:=MAX([.D65:.D73])" office:value-type="float" office:value="0.746835" calcext:value-type="float">
            <text:p>0.746835</text:p>
          </table:table-cell>
          <table:table-cell table:formula="of:=MAX([.E65:.E73])" office:value-type="float" office:value="0.650376" calcext:value-type="float">
            <text:p>0.650376</text:p>
          </table:table-cell>
          <table:table-cell table:formula="of:=MAX([.F65:.F73])" office:value-type="float" office:value="0.671593" calcext:value-type="float">
            <text:p>0.671593</text:p>
          </table:table-cell>
        </table:table-row>
        <table:table-row table:style-name="ro1">
          <table:table-cell office:value-type="string" calcext:value-type="string">
            <text:p>DHFR_MD</text:p>
          </table:table-cell>
          <table:table-cell office:value-type="string" calcext:value-type="string">
            <text:p>GraphletSampling</text:p>
          </table:table-cell>
          <table:table-cell office:value-type="string" calcext:value-type="string">
            <text:p>True</text:p>
          </table:table-cell>
          <table:table-cell office:value-type="float" office:value="0.734177" calcext:value-type="float">
            <text:p>0.734177</text:p>
          </table:table-cell>
          <table:table-cell office:value-type="float" office:value="0.621639" calcext:value-type="float">
            <text:p>0.621639</text:p>
          </table:table-cell>
          <table:table-cell office:value-type="float" office:value="0.5" calcext:value-type="float">
            <text:p>0.5</text:p>
          </table:table-cell>
          <table:table-cell office:value-type="float" office:value="12174.563859" calcext:value-type="float">
            <text:p>12174.5638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HFR_MD</text:p>
          </table:table-cell>
          <table:table-cell office:value-type="string" calcext:value-type="string">
            <text:p>HadamardCode</text:p>
          </table:table-cell>
          <table:table-cell office:value-type="string" calcext:value-type="string">
            <text:p>True</text:p>
          </table:table-cell>
          <table:table-cell office:value-type="float" office:value="0.64557" calcext:value-type="float">
            <text:p>0.64557</text:p>
          </table:table-cell>
          <table:table-cell office:value-type="float" office:value="0.576047" calcext:value-type="float">
            <text:p>0.576047</text:p>
          </table:table-cell>
          <table:table-cell office:value-type="float" office:value="0.610427" calcext:value-type="float">
            <text:p>0.610427</text:p>
          </table:table-cell>
          <table:table-cell office:value-type="float" office:value="1.74841" calcext:value-type="float">
            <text:p>1.748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HFR_MD</text:p>
          </table:table-cell>
          <table:table-cell office:value-type="string" calcext:value-type="string">
            <text:p>WeisfeilerLehman</text:p>
          </table:table-cell>
          <table:table-cell office:value-type="string" calcext:value-type="string">
            <text:p>True</text:p>
          </table:table-cell>
          <table:table-cell office:value-type="float" office:value="0.683544" calcext:value-type="float">
            <text:p>0.683544</text:p>
          </table:table-cell>
          <table:table-cell office:value-type="float" office:value="0.596174" calcext:value-type="float">
            <text:p>0.596174</text:p>
          </table:table-cell>
          <table:table-cell office:value-type="float" office:value="0.622742" calcext:value-type="float">
            <text:p>0.622742</text:p>
          </table:table-cell>
          <table:table-cell office:value-type="float" office:value="1.183536" calcext:value-type="float">
            <text:p>1.1835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HFR_MD</text:p>
          </table:table-cell>
          <table:table-cell office:value-type="string" calcext:value-type="string">
            <text:p>WeisfeilerLehmanOptimalAssignment</text:p>
          </table:table-cell>
          <table:table-cell office:value-type="string" calcext:value-type="string">
            <text:p>True</text:p>
          </table:table-cell>
          <table:table-cell office:value-type="float" office:value="0.670886" calcext:value-type="float">
            <text:p>0.670886</text:p>
          </table:table-cell>
          <table:table-cell office:value-type="float" office:value="0.620491" calcext:value-type="float">
            <text:p>0.620491</text:p>
          </table:table-cell>
          <table:table-cell office:value-type="float" office:value="0.623563" calcext:value-type="float">
            <text:p>0.623563</text:p>
          </table:table-cell>
          <table:table-cell office:value-type="float" office:value="4.446003" calcext:value-type="float">
            <text:p>4.446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HFR_MD</text:p>
          </table:table-cell>
          <table:table-cell office:value-type="string" calcext:value-type="string">
            <text:p>Propagation</text:p>
          </table:table-cell>
          <table:table-cell office:value-type="string" calcext:value-type="string">
            <text:p>True</text:p>
          </table:table-cell>
          <table:table-cell office:value-type="float" office:value="0.64557" calcext:value-type="float">
            <text:p>0.64557</text:p>
          </table:table-cell>
          <table:table-cell office:value-type="float" office:value="0.604255" calcext:value-type="float">
            <text:p>0.604255</text:p>
          </table:table-cell>
          <table:table-cell office:value-type="float" office:value="0.575944" calcext:value-type="float">
            <text:p>0.575944</text:p>
          </table:table-cell>
          <table:table-cell office:value-type="float" office:value="1.535081" calcext:value-type="float">
            <text:p>1.5350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HFR_MD</text:p>
          </table:table-cell>
          <table:table-cell office:value-type="string" calcext:value-type="string">
            <text:p>CoreFramework</text:p>
          </table:table-cell>
          <table:table-cell office:value-type="string" calcext:value-type="string">
            <text:p>True</text:p>
          </table:table-cell>
          <table:table-cell office:value-type="float" office:value="0.721519" calcext:value-type="float">
            <text:p>0.721519</text:p>
          </table:table-cell>
          <table:table-cell office:value-type="float" office:value="0.635793" calcext:value-type="float">
            <text:p>0.635793</text:p>
          </table:table-cell>
          <table:table-cell office:value-type="float" office:value="0.65312" calcext:value-type="float">
            <text:p>0.65312</text:p>
          </table:table-cell>
          <table:table-cell office:value-type="float" office:value="231.292084" calcext:value-type="float">
            <text:p>231.2920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HFR_MD</text:p>
          </table:table-cell>
          <table:table-cell office:value-type="string" calcext:value-type="string">
            <text:p>NeighborhoodHash</text:p>
          </table:table-cell>
          <table:table-cell office:value-type="string" calcext:value-type="string">
            <text:p>True</text:p>
          </table:table-cell>
          <table:table-cell office:value-type="float" office:value="0.632911" calcext:value-type="float">
            <text:p>0.632911</text:p>
          </table:table-cell>
          <table:table-cell office:value-type="float" office:value="0.56913" calcext:value-type="float">
            <text:p>0.56913</text:p>
          </table:table-cell>
          <table:table-cell office:value-type="float" office:value="0.597291" calcext:value-type="float">
            <text:p>0.597291</text:p>
          </table:table-cell>
          <table:table-cell office:value-type="float" office:value="8.361923" calcext:value-type="float">
            <text:p>8.3619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HFR_MD</text:p>
          </table:table-cell>
          <table:table-cell office:value-type="string" calcext:value-type="string">
            <text:p>PyramidMatch</text:p>
          </table:table-cell>
          <table:table-cell office:value-type="string" calcext:value-type="string">
            <text:p>True</text:p>
          </table:table-cell>
          <table:table-cell office:value-type="float" office:value="0.734177" calcext:value-type="float">
            <text:p>0.734177</text:p>
          </table:table-cell>
          <table:table-cell office:value-type="float" office:value="0.643087" calcext:value-type="float">
            <text:p>0.643087</text:p>
          </table:table-cell>
          <table:table-cell office:value-type="float" office:value="0.671593" calcext:value-type="float">
            <text:p>0.671593</text:p>
          </table:table-cell>
          <table:table-cell office:value-type="float" office:value="6.563292" calcext:value-type="float">
            <text:p>6.5632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_MD</text:p>
          </table:table-cell>
          <table:table-cell office:value-type="string" calcext:value-type="string">
            <text:p>OddSth</text:p>
          </table:table-cell>
          <table:table-cell office:value-type="string" calcext:value-type="string">
            <text:p>True</text:p>
          </table:table-cell>
          <table:table-cell office:value-type="float" office:value="0.6" calcext:value-type="float">
            <text:p>0.6</text:p>
          </table:table-cell>
          <table:table-cell office:value-type="float" office:value="0.45" calcext:value-type="float">
            <text:p>0.45</text:p>
          </table:table-cell>
          <table:table-cell office:value-type="float" office:value="0.682613" calcext:value-type="float">
            <text:p>0.682613</text:p>
          </table:table-cell>
          <table:table-cell office:value-type="float" office:value="4.277027" calcext:value-type="float">
            <text:p>4.277027</text:p>
          </table:table-cell>
          <table:table-cell table:formula="of:=MAX([.D74:.D82])" office:value-type="float" office:value="0.744444" calcext:value-type="float">
            <text:p>0.744444</text:p>
          </table:table-cell>
          <table:table-cell table:formula="of:=MAX([.E74:.E82])" office:value-type="float" office:value="0.746502" calcext:value-type="float">
            <text:p>0.746502</text:p>
          </table:table-cell>
          <table:table-cell table:formula="of:=MAX([.F74:.F82])" office:value-type="float" office:value="0.822788" calcext:value-type="float">
            <text:p>0.822788</text:p>
          </table:table-cell>
        </table:table-row>
        <table:table-row table:style-name="ro1">
          <table:table-cell office:value-type="string" calcext:value-type="string">
            <text:p>ER_MD</text:p>
          </table:table-cell>
          <table:table-cell office:value-type="string" calcext:value-type="string">
            <text:p>GraphletSampling</text:p>
          </table:table-cell>
          <table:table-cell office:value-type="string" calcext:value-type="string">
            <text:p>True</text:p>
          </table:table-cell>
          <table:table-cell office:value-type="float" office:value="0.6" calcext:value-type="float">
            <text:p>0.6</text:p>
          </table:table-cell>
          <table:table-cell office:value-type="float" office:value="0.45" calcext:value-type="float">
            <text:p>0.45</text:p>
          </table:table-cell>
          <table:table-cell office:value-type="float" office:value="0.5" calcext:value-type="float">
            <text:p>0.5</text:p>
          </table:table-cell>
          <table:table-cell office:value-type="float" office:value="11615.827397" calcext:value-type="float">
            <text:p>11615.8273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_MD</text:p>
          </table:table-cell>
          <table:table-cell office:value-type="string" calcext:value-type="string">
            <text:p>HadamardCode</text:p>
          </table:table-cell>
          <table:table-cell office:value-type="string" calcext:value-type="string">
            <text:p>True</text:p>
          </table:table-cell>
          <table:table-cell office:value-type="float" office:value="0.677778" calcext:value-type="float">
            <text:p>0.677778</text:p>
          </table:table-cell>
          <table:table-cell office:value-type="float" office:value="0.675127" calcext:value-type="float">
            <text:p>0.675127</text:p>
          </table:table-cell>
          <table:table-cell office:value-type="float" office:value="0.775463" calcext:value-type="float">
            <text:p>0.775463</text:p>
          </table:table-cell>
          <table:table-cell office:value-type="float" office:value="1.932803" calcext:value-type="float">
            <text:p>1.9328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_MD</text:p>
          </table:table-cell>
          <table:table-cell office:value-type="string" calcext:value-type="string">
            <text:p>WeisfeilerLehman</text:p>
          </table:table-cell>
          <table:table-cell office:value-type="string" calcext:value-type="string">
            <text:p>True</text:p>
          </table:table-cell>
          <table:table-cell office:value-type="float" office:value="0.722222" calcext:value-type="float">
            <text:p>0.722222</text:p>
          </table:table-cell>
          <table:table-cell office:value-type="float" office:value="0.693211" calcext:value-type="float">
            <text:p>0.693211</text:p>
          </table:table-cell>
          <table:table-cell office:value-type="float" office:value="0.822788" calcext:value-type="float">
            <text:p>0.822788</text:p>
          </table:table-cell>
          <table:table-cell office:value-type="float" office:value="1.07992" calcext:value-type="float">
            <text:p>1.079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_MD</text:p>
          </table:table-cell>
          <table:table-cell office:value-type="string" calcext:value-type="string">
            <text:p>WeisfeilerLehmanOptimalAssignment</text:p>
          </table:table-cell>
          <table:table-cell office:value-type="string" calcext:value-type="string">
            <text:p>True</text:p>
          </table:table-cell>
          <table:table-cell office:value-type="float" office:value="0.733333" calcext:value-type="float">
            <text:p>0.733333</text:p>
          </table:table-cell>
          <table:table-cell office:value-type="float" office:value="0.72" calcext:value-type="float">
            <text:p>0.72</text:p>
          </table:table-cell>
          <table:table-cell office:value-type="float" office:value="0.819187" calcext:value-type="float">
            <text:p>0.819187</text:p>
          </table:table-cell>
          <table:table-cell office:value-type="float" office:value="4.934651" calcext:value-type="float">
            <text:p>4.9346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_MD</text:p>
          </table:table-cell>
          <table:table-cell office:value-type="string" calcext:value-type="string">
            <text:p>Propagation</text:p>
          </table:table-cell>
          <table:table-cell office:value-type="string" calcext:value-type="string">
            <text:p>True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653909" calcext:value-type="float">
            <text:p>0.653909</text:p>
          </table:table-cell>
          <table:table-cell office:value-type="float" office:value="0.690329" calcext:value-type="float">
            <text:p>0.690329</text:p>
          </table:table-cell>
          <table:table-cell office:value-type="float" office:value="1.629149" calcext:value-type="float">
            <text:p>1.6291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_MD</text:p>
          </table:table-cell>
          <table:table-cell office:value-type="string" calcext:value-type="string">
            <text:p>CoreFramework</text:p>
          </table:table-cell>
          <table:table-cell office:value-type="string" calcext:value-type="string">
            <text:p>True</text:p>
          </table:table-cell>
          <table:table-cell office:value-type="float" office:value="0.722222" calcext:value-type="float">
            <text:p>0.722222</text:p>
          </table:table-cell>
          <table:table-cell office:value-type="float" office:value="0.723767" calcext:value-type="float">
            <text:p>0.723767</text:p>
          </table:table-cell>
          <table:table-cell office:value-type="float" office:value="0.762603" calcext:value-type="float">
            <text:p>0.762603</text:p>
          </table:table-cell>
          <table:table-cell office:value-type="float" office:value="212.090754" calcext:value-type="float">
            <text:p>212.0907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_MD</text:p>
          </table:table-cell>
          <table:table-cell office:value-type="string" calcext:value-type="string">
            <text:p>NeighborhoodHash</text:p>
          </table:table-cell>
          <table:table-cell office:value-type="string" calcext:value-type="string">
            <text:p>True</text:p>
          </table:table-cell>
          <table:table-cell office:value-type="float" office:value="0.722222" calcext:value-type="float">
            <text:p>0.722222</text:p>
          </table:table-cell>
          <table:table-cell office:value-type="float" office:value="0.693211" calcext:value-type="float">
            <text:p>0.693211</text:p>
          </table:table-cell>
          <table:table-cell office:value-type="float" office:value="0.813529" calcext:value-type="float">
            <text:p>0.813529</text:p>
          </table:table-cell>
          <table:table-cell office:value-type="float" office:value="8.314304" calcext:value-type="float">
            <text:p>8.3143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_MD</text:p>
          </table:table-cell>
          <table:table-cell office:value-type="string" calcext:value-type="string">
            <text:p>PyramidMatch</text:p>
          </table:table-cell>
          <table:table-cell office:value-type="string" calcext:value-type="string">
            <text:p>True</text:p>
          </table:table-cell>
          <table:table-cell office:value-type="float" office:value="0.744444" calcext:value-type="float">
            <text:p>0.744444</text:p>
          </table:table-cell>
          <table:table-cell office:value-type="float" office:value="0.746502" calcext:value-type="float">
            <text:p>0.746502</text:p>
          </table:table-cell>
          <table:table-cell office:value-type="float" office:value="0.800412" calcext:value-type="float">
            <text:p>0.800412</text:p>
          </table:table-cell>
          <table:table-cell office:value-type="float" office:value="7.522739" calcext:value-type="float">
            <text:p>7.5227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DB-BINARY</text:p>
          </table:table-cell>
          <table:table-cell office:value-type="string" calcext:value-type="string">
            <text:p>OddSth</text:p>
          </table:table-cell>
          <table:table-cell office:value-type="string" calcext:value-type="string">
            <text:p>True</text:p>
          </table:table-cell>
          <table:table-cell office:value-type="float" office:value="0.73" calcext:value-type="float">
            <text:p>0.73</text:p>
          </table:table-cell>
          <table:table-cell office:value-type="float" office:value="0.72943" calcext:value-type="float">
            <text:p>0.72943</text:p>
          </table:table-cell>
          <table:table-cell office:value-type="float" office:value="0.826973" calcext:value-type="float">
            <text:p>0.826973</text:p>
          </table:table-cell>
          <table:table-cell office:value-type="float" office:value="14.342783" calcext:value-type="float">
            <text:p>14.342783</text:p>
          </table:table-cell>
          <table:table-cell table:formula="of:=MAX([.D83:.D91])" office:value-type="float" office:value="0.775" calcext:value-type="float">
            <text:p>0.775</text:p>
          </table:table-cell>
          <table:table-cell table:formula="of:=MAX([.E83:.E91])" office:value-type="float" office:value="0.774814" calcext:value-type="float">
            <text:p>0.774814</text:p>
          </table:table-cell>
          <table:table-cell table:formula="of:=MAX([.F83:.F91])" office:value-type="float" office:value="0.833033" calcext:value-type="float">
            <text:p>0.833033</text:p>
          </table:table-cell>
        </table:table-row>
        <table:table-row table:style-name="ro1">
          <table:table-cell office:value-type="string" calcext:value-type="string">
            <text:p>IMDB-BINARY</text:p>
          </table:table-cell>
          <table:table-cell office:value-type="string" calcext:value-type="string">
            <text:p>GraphletSampling</text:p>
          </table:table-cell>
          <table:table-cell office:value-type="string" calcext:value-type="string">
            <text:p>True</text:p>
          </table:table-cell>
          <table:table-cell office:value-type="float" office:value="0.61" calcext:value-type="float">
            <text:p>0.61</text:p>
          </table:table-cell>
          <table:table-cell office:value-type="float" office:value="0.609805" calcext:value-type="float">
            <text:p>0.609805</text:p>
          </table:table-cell>
          <table:table-cell office:value-type="float" office:value="0.636418" calcext:value-type="float">
            <text:p>0.636418</text:p>
          </table:table-cell>
          <table:table-cell office:value-type="float" office:value="20818.684996" calcext:value-type="float">
            <text:p>20818.6849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DB-BINARY</text:p>
          </table:table-cell>
          <table:table-cell office:value-type="string" calcext:value-type="string">
            <text:p>HadamardCode</text:p>
          </table:table-cell>
          <table:table-cell office:value-type="string" calcext:value-type="string">
            <text:p>True</text:p>
          </table:table-cell>
          <table:table-cell office:value-type="float" office:value="0.48" calcext:value-type="float">
            <text:p>0.48</text:p>
          </table:table-cell>
          <table:table-cell office:value-type="float" office:value="0.311351" calcext:value-type="float">
            <text:p>0.311351</text:p>
          </table:table-cell>
          <table:table-cell office:value-type="float" office:value="0.5" calcext:value-type="float">
            <text:p>0.5</text:p>
          </table:table-cell>
          <table:table-cell office:value-type="float" office:value="3.46238" calcext:value-type="float">
            <text:p>3.462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DB-BINARY</text:p>
          </table:table-cell>
          <table:table-cell office:value-type="string" calcext:value-type="string">
            <text:p>WeisfeilerLehman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.810096" calcext:value-type="float">
            <text:p>0.810096</text:p>
          </table:table-cell>
          <table:table-cell office:value-type="float" office:value="1.368628" calcext:value-type="float">
            <text:p>1.3686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DB-BINARY</text:p>
          </table:table-cell>
          <table:table-cell office:value-type="string" calcext:value-type="string">
            <text:p>WeisfeilerLehmanOptimalAssignment</text:p>
          </table:table-cell>
          <table:table-cell office:value-type="string" calcext:value-type="string">
            <text:p>True</text:p>
          </table:table-cell>
          <table:table-cell office:value-type="float" office:value="0.725" calcext:value-type="float">
            <text:p>0.725</text:p>
          </table:table-cell>
          <table:table-cell office:value-type="float" office:value="0.723946" calcext:value-type="float">
            <text:p>0.723946</text:p>
          </table:table-cell>
          <table:table-cell office:value-type="float" office:value="0.805088" calcext:value-type="float">
            <text:p>0.805088</text:p>
          </table:table-cell>
          <table:table-cell office:value-type="float" office:value="43.300225" calcext:value-type="float">
            <text:p>43.3002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DB-BINARY</text:p>
          </table:table-cell>
          <table:table-cell office:value-type="string" calcext:value-type="string">
            <text:p>Propagation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.77" calcext:value-type="float">
            <text:p>0.77</text:p>
          </table:table-cell>
          <table:table-cell office:value-type="float" office:value="0.821514" calcext:value-type="float">
            <text:p>0.821514</text:p>
          </table:table-cell>
          <table:table-cell office:value-type="float" office:value="9.424943" calcext:value-type="float">
            <text:p>9.4249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DB-BINARY</text:p>
          </table:table-cell>
          <table:table-cell office:value-type="string" calcext:value-type="string">
            <text:p>CoreFramework</text:p>
          </table:table-cell>
          <table:table-cell office:value-type="string" calcext:value-type="string">
            <text:p>True</text:p>
          </table:table-cell>
          <table:table-cell office:value-type="float" office:value="0.775" calcext:value-type="float">
            <text:p>0.775</text:p>
          </table:table-cell>
          <table:table-cell office:value-type="float" office:value="0.774814" calcext:value-type="float">
            <text:p>0.774814</text:p>
          </table:table-cell>
          <table:table-cell office:value-type="float" office:value="0.833033" calcext:value-type="float">
            <text:p>0.833033</text:p>
          </table:table-cell>
          <table:table-cell office:value-type="float" office:value="137.148149" calcext:value-type="float">
            <text:p>137.1481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DB-BINARY</text:p>
          </table:table-cell>
          <table:table-cell office:value-type="string" calcext:value-type="string">
            <text:p>NeighborhoodHash</text:p>
          </table:table-cell>
          <table:table-cell office:value-type="string" calcext:value-type="string">
            <text:p>True</text:p>
          </table:table-cell>
          <table:table-cell office:value-type="float" office:value="0.565" calcext:value-type="float">
            <text:p>0.565</text:p>
          </table:table-cell>
          <table:table-cell office:value-type="float" office:value="0.535245" calcext:value-type="float">
            <text:p>0.535245</text:p>
          </table:table-cell>
          <table:table-cell office:value-type="float" office:value="0.701923" calcext:value-type="float">
            <text:p>0.701923</text:p>
          </table:table-cell>
          <table:table-cell office:value-type="float" office:value="23.237313" calcext:value-type="float">
            <text:p>23.2373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DB-BINARY</text:p>
          </table:table-cell>
          <table:table-cell office:value-type="string" calcext:value-type="string">
            <text:p>PyramidMatch</text:p>
          </table:table-cell>
          <table:table-cell office:value-type="string" calcext:value-type="string">
            <text:p>True</text:p>
          </table:table-cell>
          <table:table-cell office:value-type="float" office:value="0.585" calcext:value-type="float">
            <text:p>0.585</text:p>
          </table:table-cell>
          <table:table-cell office:value-type="float" office:value="0.584907" calcext:value-type="float">
            <text:p>0.584907</text:p>
          </table:table-cell>
          <table:table-cell office:value-type="float" office:value="0.659054" calcext:value-type="float">
            <text:p>0.659054</text:p>
          </table:table-cell>
          <table:table-cell office:value-type="float" office:value="30.264341" calcext:value-type="float">
            <text:p>30.2643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DB-MULTI</text:p>
          </table:table-cell>
          <table:table-cell office:value-type="string" calcext:value-type="string">
            <text:p>OddSth</text:p>
          </table:table-cell>
          <table:table-cell office:value-type="string" calcext:value-type="string">
            <text:p>True</text:p>
          </table:table-cell>
          <table:table-cell office:value-type="float" office:value="0.5" calcext:value-type="float">
            <text:p>0.5</text:p>
          </table:table-cell>
          <table:table-cell office:value-type="float" office:value="0.47751" calcext:value-type="float">
            <text:p>0.47751</text:p>
          </table:table-cell>
          <table:table-cell office:value-type="float" office:value="0.649696" calcext:value-type="float">
            <text:p>0.649696</text:p>
          </table:table-cell>
          <table:table-cell office:value-type="float" office:value="11.236593" calcext:value-type="float">
            <text:p>11.236593</text:p>
          </table:table-cell>
          <table:table-cell table:formula="of:=MAX([.D92:.D100])" office:value-type="float" office:value="0.5" calcext:value-type="float">
            <text:p>0.5</text:p>
          </table:table-cell>
          <table:table-cell table:formula="of:=MAX([.E92:.E100])" office:value-type="float" office:value="0.47751" calcext:value-type="float">
            <text:p>0.47751</text:p>
          </table:table-cell>
          <table:table-cell table:formula="of:=MAX([.F92:.F100])" office:value-type="float" office:value="0.654352" calcext:value-type="float">
            <text:p>0.654352</text:p>
          </table:table-cell>
        </table:table-row>
        <table:table-row table:style-name="ro1">
          <table:table-cell office:value-type="string" calcext:value-type="string">
            <text:p>IMDB-MULTI</text:p>
          </table:table-cell>
          <table:table-cell office:value-type="string" calcext:value-type="string">
            <text:p>GraphletSampling</text:p>
          </table:table-cell>
          <table:table-cell office:value-type="string" calcext:value-type="string">
            <text:p>True</text:p>
          </table:table-cell>
          <table:table-cell office:value-type="float" office:value="0.42" calcext:value-type="float">
            <text:p>0.42</text:p>
          </table:table-cell>
          <table:table-cell office:value-type="float" office:value="0.400363" calcext:value-type="float">
            <text:p>0.400363</text:p>
          </table:table-cell>
          <table:table-cell office:value-type="float" office:value="0.575691" calcext:value-type="float">
            <text:p>0.575691</text:p>
          </table:table-cell>
          <table:table-cell office:value-type="float" office:value="16532.106836" calcext:value-type="float">
            <text:p>16532.1068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DB-MULTI</text:p>
          </table:table-cell>
          <table:table-cell office:value-type="string" calcext:value-type="string">
            <text:p>HadamardCode</text:p>
          </table:table-cell>
          <table:table-cell office:value-type="string" calcext:value-type="string">
            <text:p>True</text:p>
          </table:table-cell>
          <table:table-cell office:value-type="float" office:value="0.456667" calcext:value-type="float">
            <text:p>0.456667</text:p>
          </table:table-cell>
          <table:table-cell office:value-type="float" office:value="0.455385" calcext:value-type="float">
            <text:p>0.455385</text:p>
          </table:table-cell>
          <table:table-cell office:value-type="float" office:value="0.654352" calcext:value-type="float">
            <text:p>0.654352</text:p>
          </table:table-cell>
          <table:table-cell office:value-type="float" office:value="4.022681" calcext:value-type="float">
            <text:p>4.0226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DB-MULTI</text:p>
          </table:table-cell>
          <table:table-cell office:value-type="string" calcext:value-type="string">
            <text:p>WeisfeilerLehman</text:p>
          </table:table-cell>
          <table:table-cell office:value-type="string" calcext:value-type="string">
            <text:p>True</text:p>
          </table:table-cell>
          <table:table-cell office:value-type="float" office:value="0.45" calcext:value-type="float">
            <text:p>0.45</text:p>
          </table:table-cell>
          <table:table-cell office:value-type="float" office:value="0.447557" calcext:value-type="float">
            <text:p>0.447557</text:p>
          </table:table-cell>
          <table:table-cell office:value-type="float" office:value="0.643339" calcext:value-type="float">
            <text:p>0.643339</text:p>
          </table:table-cell>
          <table:table-cell office:value-type="float" office:value="1.865052" calcext:value-type="float">
            <text:p>1.8650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DB-MULTI</text:p>
          </table:table-cell>
          <table:table-cell office:value-type="string" calcext:value-type="string">
            <text:p>WeisfeilerLehmanOptimalAssignment</text:p>
          </table:table-cell>
          <table:table-cell office:value-type="string" calcext:value-type="string">
            <text:p>True</text:p>
          </table:table-cell>
          <table:table-cell office:value-type="float" office:value="0.443333" calcext:value-type="float">
            <text:p>0.443333</text:p>
          </table:table-cell>
          <table:table-cell office:value-type="float" office:value="0.442748" calcext:value-type="float">
            <text:p>0.442748</text:p>
          </table:table-cell>
          <table:table-cell office:value-type="float" office:value="0.638039" calcext:value-type="float">
            <text:p>0.638039</text:p>
          </table:table-cell>
          <table:table-cell office:value-type="float" office:value="90.685238" calcext:value-type="float">
            <text:p>90.6852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DB-MULTI</text:p>
          </table:table-cell>
          <table:table-cell office:value-type="string" calcext:value-type="string">
            <text:p>Propagation</text:p>
          </table:table-cell>
          <table:table-cell office:value-type="string" calcext:value-type="string">
            <text:p>True</text:p>
          </table:table-cell>
          <table:table-cell office:value-type="float" office:value="0.456667" calcext:value-type="float">
            <text:p>0.456667</text:p>
          </table:table-cell>
          <table:table-cell office:value-type="float" office:value="0.454653" calcext:value-type="float">
            <text:p>0.454653</text:p>
          </table:table-cell>
          <table:table-cell office:value-type="float" office:value="0.64434" calcext:value-type="float">
            <text:p>0.64434</text:p>
          </table:table-cell>
          <table:table-cell office:value-type="float" office:value="18.515222" calcext:value-type="float">
            <text:p>18.5152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DB-MULTI</text:p>
          </table:table-cell>
          <table:table-cell office:value-type="string" calcext:value-type="string">
            <text:p>CoreFramework</text:p>
          </table:table-cell>
          <table:table-cell office:value-type="string" calcext:value-type="string">
            <text:p>True</text:p>
          </table:table-cell>
          <table:table-cell office:value-type="float" office:value="0.493333" calcext:value-type="float">
            <text:p>0.493333</text:p>
          </table:table-cell>
          <table:table-cell office:value-type="float" office:value="0.473251" calcext:value-type="float">
            <text:p>0.473251</text:p>
          </table:table-cell>
          <table:table-cell office:value-type="float" office:value="0.654076" calcext:value-type="float">
            <text:p>0.654076</text:p>
          </table:table-cell>
          <table:table-cell office:value-type="float" office:value="162.146466" calcext:value-type="float">
            <text:p>162.1464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DB-MULTI</text:p>
          </table:table-cell>
          <table:table-cell office:value-type="string" calcext:value-type="string">
            <text:p>NeighborhoodHash</text:p>
          </table:table-cell>
          <table:table-cell office:value-type="string" calcext:value-type="string">
            <text:p>True</text:p>
          </table:table-cell>
          <table:table-cell office:value-type="float" office:value="0.443333" calcext:value-type="float">
            <text:p>0.443333</text:p>
          </table:table-cell>
          <table:table-cell office:value-type="float" office:value="0.441712" calcext:value-type="float">
            <text:p>0.441712</text:p>
          </table:table-cell>
          <table:table-cell office:value-type="float" office:value="0.606748" calcext:value-type="float">
            <text:p>0.606748</text:p>
          </table:table-cell>
          <table:table-cell office:value-type="float" office:value="29.906042" calcext:value-type="float">
            <text:p>29.9060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DB-MULTI</text:p>
          </table:table-cell>
          <table:table-cell office:value-type="string" calcext:value-type="string">
            <text:p>PyramidMatch</text:p>
          </table:table-cell>
          <table:table-cell office:value-type="string" calcext:value-type="string">
            <text:p>True</text:p>
          </table:table-cell>
          <table:table-cell office:value-type="float" office:value="0.47" calcext:value-type="float">
            <text:p>0.47</text:p>
          </table:table-cell>
          <table:table-cell office:value-type="float" office:value="0.468156" calcext:value-type="float">
            <text:p>0.468156</text:p>
          </table:table-cell>
          <table:table-cell office:value-type="float" office:value="0.632907" calcext:value-type="float">
            <text:p>0.632907</text:p>
          </table:table-cell>
          <table:table-cell office:value-type="float" office:value="67.42255" calcext:value-type="float">
            <text:p>67.4225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11T10:44:28.679580871</dc:date>
    <meta:editing-duration>PT7M49S</meta:editing-duration>
    <meta:editing-cycles>1</meta:editing-cycles>
    <meta:document-statistic meta:table-count="1" meta:cell-count="733" meta:object-count="0"/>
    <meta:generator>LibreOffice/7.3.7.2$Linux_X86_64 LibreOffice_project/30$Build-2</meta:generator>
  </office:meta>
</office:document-meta>
</file>